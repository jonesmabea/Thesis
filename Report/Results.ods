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1014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4" table:number-rows-spanned="1" table:style-name="ce4">
            <text:p>Batch Size 2 Alpha 1 Beta 10 Learning Rate 0.0010</text:p>
          </table:table-cell>
          <table:covered-table-cell table:number-columns-repeated="3"/>
          <table:table-cell table:style-name="ce2"/>
          <table:table-cell office:value-type="string" table:number-columns-spanned="4" table:number-rows-spanned="1" table:style-name="ce4">
            <text:p>Default Urban Car</text:p>
          </table:table-cell>
          <table:covered-table-cell table:number-columns-repeated="3"/>
          <table:table-cell table:style-name="ce2"/>
          <table:table-cell office:value-type="string" table:style-name="ce2">
            <text:p>Easy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Hard</text:p>
          </table:table-cell>
          <table:table-cell office:value-type="string" table:style-name="ce2">
            <text:p>AVG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office:value-type="string" table:style-name="ce1">
            <text:p>car_detection AP</text:p>
          </table:table-cell>
          <table:table-cell office:value-type="float" office:value="66.694275000000005" table:style-name="ce1">
            <text:p>66.694275</text:p>
          </table:table-cell>
          <table:table-cell office:value-type="float" office:value="61.794047999999997" table:style-name="ce1">
            <text:p>61.794048</text:p>
          </table:table-cell>
          <table:table-cell office:value-type="float" office:value="56.704200999999998" table:style-name="ce1">
            <text:p>56.704201</text:p>
          </table:table-cell>
          <table:table-cell table:style-name="ce1"/>
          <table:table-cell table:style-name="ce3"/>
          <table:table-cell office:value-type="string" table:style-name="ce3">
            <text:p>Easy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Hard</text:p>
          </table:table-cell>
          <table:table-cell office:value-type="string" table:style-name="ce3">
            <text:p>Car Detection</text:p>
          </table:table-cell>
          <table:table-cell office:value-type="float" office:value="6.3155820000000062" table:formula="of:=ABS([.G3]-[.G10])" table:style-name="ce1">
            <text:p>6.315582</text:p>
          </table:table-cell>
          <table:table-cell office:value-type="float" office:value="1.1937870000000004" table:formula="of:=ABS([.H3]-[.H10])" table:style-name="ce1">
            <text:p>1.193787</text:p>
          </table:table-cell>
          <table:table-cell office:value-type="float" office:value="2.0498660000000015" table:formula="of:=ABS([.I3]-[.I10])" table:style-name="ce1">
            <text:p>2.049866</text:p>
          </table:table-cell>
          <table:table-cell office:value-type="float" office:value="3.1864116666666695" table:formula="of:=AVERAGE([.K2:.M2])" table:style-name="ce1">
            <text:p>3.186411667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car_orientation AP</text:p>
          </table:table-cell>
          <table:table-cell office:value-type="float" office:value="29.60228" table:style-name="ce1">
            <text:p>29.60228</text:p>
          </table:table-cell>
          <table:table-cell office:value-type="float" office:value="26.724779000000002" table:style-name="ce1">
            <text:p>26.724779</text:p>
          </table:table-cell>
          <table:table-cell office:value-type="float" office:value="24.898244999999999" table:style-name="ce1">
            <text:p>24.898245</text:p>
          </table:table-cell>
          <table:table-cell table:style-name="ce1"/>
          <table:table-cell office:value-type="string" table:style-name="ce1">
            <text:p>car_detection AP</text:p>
          </table:table-cell>
          <table:table-cell office:value-type="float" office:value="71.210792999999995" table:style-name="ce1">
            <text:p>71.210793</text:p>
          </table:table-cell>
          <table:table-cell office:value-type="float" office:value="66.723724000000004" table:style-name="ce1">
            <text:p>66.723724</text:p>
          </table:table-cell>
          <table:table-cell office:value-type="float" office:value="59.916339999999998" table:style-name="ce1">
            <text:p>59.91634</text:p>
          </table:table-cell>
          <table:table-cell office:value-type="string" table:style-name="ce1">
            <text:p>Car Orientation</text:p>
          </table:table-cell>
          <table:table-cell office:value-type="float" office:value="5.0349399999999989" table:formula="of:=ABS([.G4]-[.G11])" table:style-name="ce1">
            <text:p>5.03494</text:p>
          </table:table-cell>
          <table:table-cell office:value-type="float" office:value="1.8520729999999972" table:formula="of:=ABS([.H4]-[.H11])" table:style-name="ce1">
            <text:p>1.852073</text:p>
          </table:table-cell>
          <table:table-cell office:value-type="float" office:value="2.0590960000000003" table:formula="of:=ABS([.I4]-[.I11])" table:style-name="ce1">
            <text:p>2.059096</text:p>
          </table:table-cell>
          <table:table-cell office:value-type="float" office:value="2.982036333333332" table:formula="of:=AVERAGE([.K3:.M3])" table:style-name="ce1">
            <text:p>2.982036333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car_detection_ground</text:p>
          </table:table-cell>
          <table:table-cell office:value-type="float" office:value="83.221396999999996" table:style-name="ce1">
            <text:p>83.221397</text:p>
          </table:table-cell>
          <table:table-cell office:value-type="float" office:value="71.564475999999999" table:style-name="ce1">
            <text:p>71.564476</text:p>
          </table:table-cell>
          <table:table-cell office:value-type="float" office:value="65.815987000000007" table:style-name="ce1">
            <text:p>65.815987</text:p>
          </table:table-cell>
          <table:table-cell table:style-name="ce1"/>
          <table:table-cell office:value-type="string" table:style-name="ce1">
            <text:p>car_orientation AP</text:p>
          </table:table-cell>
          <table:table-cell office:value-type="float" office:value="29.040751" table:style-name="ce1">
            <text:p>29.040751</text:p>
          </table:table-cell>
          <table:table-cell office:value-type="float" office:value="27.085087000000001" table:style-name="ce1">
            <text:p>27.085087</text:p>
          </table:table-cell>
          <table:table-cell office:value-type="float" office:value="24.349730999999998" table:style-name="ce1">
            <text:p>24.349731</text:p>
          </table:table-cell>
          <table:table-cell office:value-type="string" table:style-name="ce1">
            <text:p>Car Ground Detection</text:p>
          </table:table-cell>
          <table:table-cell office:value-type="float" office:value="5.0306319999999971" table:formula="of:=ABS([.G5]-[.G12])" table:style-name="ce1">
            <text:p>5.030632</text:p>
          </table:table-cell>
          <table:table-cell office:value-type="float" office:value="3.4164889999999986" table:formula="of:=ABS([.H5]-[.H12])" table:style-name="ce1">
            <text:p>3.416489</text:p>
          </table:table-cell>
          <table:table-cell office:value-type="float" office:value="3.3086089999999899" table:formula="of:=ABS([.I5]-[.I12])" table:style-name="ce1">
            <text:p>3.308609</text:p>
          </table:table-cell>
          <table:table-cell office:value-type="float" office:value="3.9185766666666617" table:formula="of:=AVERAGE([.K4:.M4])" table:style-name="ce1">
            <text:p>3.918576667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car_detection_3d AP</text:p>
          </table:table-cell>
          <table:table-cell office:value-type="float" office:value="44.193409000000003" table:style-name="ce1">
            <text:p>44.193409</text:p>
          </table:table-cell>
          <table:table-cell office:value-type="float" office:value="37.166308999999998" table:style-name="ce1">
            <text:p>37.166309</text:p>
          </table:table-cell>
          <table:table-cell office:value-type="float" office:value="34.312012000000003" table:style-name="ce1">
            <text:p>34.312012</text:p>
          </table:table-cell>
          <table:table-cell table:style-name="ce1"/>
          <table:table-cell office:value-type="string" table:style-name="ce1">
            <text:p>car_detection_ground</text:p>
          </table:table-cell>
          <table:table-cell office:value-type="float" office:value="83.221396999999996" table:style-name="ce1">
            <text:p>83.221397</text:p>
          </table:table-cell>
          <table:table-cell office:value-type="float" office:value="71.564475999999999" table:style-name="ce1">
            <text:p>71.564476</text:p>
          </table:table-cell>
          <table:table-cell office:value-type="float" office:value="65.815987000000007" table:style-name="ce1">
            <text:p>65.815987</text:p>
          </table:table-cell>
          <table:table-cell office:value-type="string" table:style-name="ce1">
            <text:p>Car 3D Detection<text:s/></text:p>
          </table:table-cell>
          <table:table-cell office:value-type="float" office:value="23.405956000000003" table:formula="of:=ABS([.G6]-[.G13])" table:style-name="ce1">
            <text:p>23.405956</text:p>
          </table:table-cell>
          <table:table-cell office:value-type="float" office:value="12.298317000000004" table:formula="of:=ABS([.H6]-[.H13])" table:style-name="ce1">
            <text:p>12.298317</text:p>
          </table:table-cell>
          <table:table-cell office:value-type="float" office:value="10.441870999999999" table:formula="of:=ABS([.I6]-[.I13])" table:style-name="ce1">
            <text:p>10.441871</text:p>
          </table:table-cell>
          <table:table-cell office:value-type="float" office:value="15.382048000000003" table:formula="of:=AVERAGE([.K5:.M5])" table:style-name="ce1">
            <text:p>15.382048</text:p>
          </table:table-cell>
          <table:table-cell table:number-columns-repeated="16370" table:style-name="ce1"/>
        </table:table-row>
        <table:table-row table:style-name="ro3">
          <table:table-cell table:number-columns-repeated="5" table:style-name="ce1"/>
          <table:table-cell office:value-type="string" table:style-name="ce1">
            <text:p>car_detection_3d AP</text:p>
          </table:table-cell>
          <table:table-cell office:value-type="float" office:value="44.193409000000003" table:style-name="ce1">
            <text:p>44.193409</text:p>
          </table:table-cell>
          <table:table-cell office:value-type="float" office:value="37.166308999999998" table:style-name="ce1">
            <text:p>37.166309</text:p>
          </table:table-cell>
          <table:table-cell office:value-type="float" office:value="34.312012000000003" table:style-name="ce1">
            <text:p>34.312012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4" table:number-rows-spanned="1" table:style-name="ce4">
            <text:p>Pre Trained Car</text:p>
          </table:table-cell>
          <table:covered-table-cell table:number-columns-repeated="3"/>
          <table:table-cell table:style-name="ce5"/>
          <table:table-cell table:number-columns-repeated="4" table:style-name="ce1"/>
          <table:table-cell table:style-name="ce5"/>
          <table:table-cell table:number-columns-repeated="3" table:style-name="ce1"/>
          <table:table-cell table:number-columns-repeated="1011" table:style-name="ce5"/>
          <table:table-cell table:number-columns-repeated="15360"/>
        </table:table-row>
        <table:table-row table:style-name="ro2">
          <table:table-cell office:value-type="string" table:style-name="ce1">
            <text:p>car_detection AP</text:p>
          </table:table-cell>
          <table:table-cell office:value-type="float" office:value="65.951279" table:style-name="ce1">
            <text:p>65.951279</text:p>
          </table:table-cell>
          <table:table-cell office:value-type="float" office:value="56.683436999999998" table:style-name="ce1">
            <text:p>56.683437</text:p>
          </table:table-cell>
          <table:table-cell office:value-type="float" office:value="55.972510999999997" table:style-name="ce1">
            <text:p>55.972511</text:p>
          </table:table-cell>
          <table:table-cell table:style-name="ce1"/>
          <table:table-cell office:value-type="string" table:number-columns-spanned="4" table:number-rows-spanned="1" table:style-name="ce4">
            <text:p>Default Non Urban Car</text:p>
          </table:table-cell>
          <table:covered-table-cell table:number-columns-repeated="3"/>
          <table:table-cell table:number-columns-repeated="16375" table:style-name="ce1"/>
        </table:table-row>
        <table:table-row table:style-name="ro2">
          <table:table-cell office:value-type="string" table:style-name="ce1">
            <text:p>car_orientation AP</text:p>
          </table:table-cell>
          <table:table-cell office:value-type="float" office:value="29.448753" table:style-name="ce1">
            <text:p>29.448753</text:p>
          </table:table-cell>
          <table:table-cell office:value-type="float" office:value="24.406552999999999" table:style-name="ce1">
            <text:p>24.406553</text:p>
          </table:table-cell>
          <table:table-cell office:value-type="float" office:value="24.823098999999999" table:style-name="ce1">
            <text:p>24.823099</text:p>
          </table:table-cell>
          <table:table-cell table:style-name="ce1"/>
          <table:table-cell table:style-name="ce3"/>
          <table:table-cell office:value-type="string" table:style-name="ce3">
            <text:p>Easy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Hard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car_detection_ground</text:p>
          </table:table-cell>
          <table:table-cell office:value-type="float" office:value="81.242408999999995" table:style-name="ce1">
            <text:p>81.242409</text:p>
          </table:table-cell>
          <table:table-cell office:value-type="float" office:value="70.672707000000003" table:style-name="ce1">
            <text:p>70.672707</text:p>
          </table:table-cell>
          <table:table-cell office:value-type="float" office:value="65.347594999999998" table:style-name="ce1">
            <text:p>65.347595</text:p>
          </table:table-cell>
          <table:table-cell table:style-name="ce1"/>
          <table:table-cell office:value-type="string" table:style-name="ce1">
            <text:p>car_detection AP</text:p>
          </table:table-cell>
          <table:table-cell office:value-type="float" office:value="77.526375000000002" table:style-name="ce1">
            <text:p>77.526375</text:p>
          </table:table-cell>
          <table:table-cell office:value-type="float" office:value="67.917511000000005" table:style-name="ce1">
            <text:p>67.917511</text:p>
          </table:table-cell>
          <table:table-cell office:value-type="float" office:value="61.966206" table:style-name="ce1">
            <text:p>61.966206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car_detection_3d AP</text:p>
          </table:table-cell>
          <table:table-cell office:value-type="float" office:value="40.000149" table:style-name="ce1">
            <text:p>40.000149</text:p>
          </table:table-cell>
          <table:table-cell office:value-type="float" office:value="34.892158999999999" table:style-name="ce1">
            <text:p>34.892159</text:p>
          </table:table-cell>
          <table:table-cell office:value-type="float" office:value="31.376111999999999" table:style-name="ce1">
            <text:p>31.376112</text:p>
          </table:table-cell>
          <table:table-cell table:style-name="ce1"/>
          <table:table-cell office:value-type="string" table:style-name="ce1">
            <text:p>car_orientation AP</text:p>
          </table:table-cell>
          <table:table-cell office:value-type="float" office:value="34.075690999999999" table:style-name="ce1">
            <text:p>34.075691</text:p>
          </table:table-cell>
          <table:table-cell office:value-type="float" office:value="28.937159999999999" table:style-name="ce1">
            <text:p>28.93716</text:p>
          </table:table-cell>
          <table:table-cell office:value-type="float" office:value="26.408826999999999" table:style-name="ce1">
            <text:p>26.408827</text:p>
          </table:table-cell>
          <table:table-cell table:number-columns-repeated="16375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car_detection_ground</text:p>
          </table:table-cell>
          <table:table-cell office:value-type="float" office:value="88.252028999999993" table:style-name="ce1">
            <text:p>88.252029</text:p>
          </table:table-cell>
          <table:table-cell office:value-type="float" office:value="74.980964999999998" table:style-name="ce1">
            <text:p>74.980965</text:p>
            <draw:frame draw:z-index="2" draw:id="id1" draw:style-name="a1" draw:name="Chart 4" svg:x="1.11111in" svg:y="0.19444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office:value-type="float" office:value="69.124595999999997" table:style-name="ce1">
            <text:p>69.124596</text:p>
          </table:table-cell>
          <table:table-cell table:number-columns-repeated="16375" table:style-name="ce1"/>
        </table:table-row>
        <table:table-row table:style-name="ro2">
          <table:table-cell office:value-type="string" table:number-columns-spanned="4" table:number-rows-spanned="1" table:style-name="ce7">
            <text:p>Batch Size 2 Alpha 1.5 Beta 1 Learning Rate 0.001 SGD</text:p>
          </table:table-cell>
          <table:covered-table-cell table:number-columns-repeated="3"/>
          <table:table-cell table:style-name="ce6"/>
          <table:table-cell office:value-type="string" table:style-name="ce1">
            <text:p>car_detection_3d AP</text:p>
          </table:table-cell>
          <table:table-cell office:value-type="float" office:value="67.599365000000006" table:style-name="ce1">
            <text:p>67.599365</text:p>
          </table:table-cell>
          <table:table-cell office:value-type="float" office:value="49.464626000000003" table:style-name="ce1">
            <text:p>49.464626</text:p>
          </table:table-cell>
          <table:table-cell office:value-type="float" office:value="44.753883000000002" table:style-name="ce1">
            <text:p>44.753883</text:p>
          </table:table-cell>
          <table:table-cell table:number-columns-repeated="16375" table:style-name="ce6"/>
        </table:table-row>
        <table:table-row table:style-name="ro2">
          <table:table-cell office:value-type="string" table:style-name="ce1">
            <text:p>car_detection AP</text:p>
          </table:table-cell>
          <table:table-cell office:value-type="float" office:value="54.131399999999999" table:style-name="ce1">
            <text:p>54.1314</text:p>
          </table:table-cell>
          <table:table-cell office:value-type="float" office:value="51.987816000000002" table:style-name="ce1">
            <text:p>51.987816</text:p>
          </table:table-cell>
          <table:table-cell office:value-type="float" office:value="49.845999999999997" table:style-name="ce1">
            <text:p>49.84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ar_orientation AP</text:p>
          </table:table-cell>
          <table:table-cell office:value-type="float" office:value="24.368808999999999" table:style-name="ce1">
            <text:p>24.368809</text:p>
          </table:table-cell>
          <table:table-cell office:value-type="float" office:value="22.992683" table:style-name="ce1">
            <text:p>22.992683</text:p>
          </table:table-cell>
          <table:table-cell office:value-type="float" office:value="22.404900000000001" table:style-name="ce1">
            <text:p>22.4049</text:p>
          </table:table-cell>
          <table:table-cell table:style-name="ce1"/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string" table:style-name="ce1">
            <text:p>car_detection_ground</text:p>
          </table:table-cell>
          <table:table-cell office:value-type="float" office:value="67.788600000000002" table:style-name="ce1">
            <text:p>67.7886</text:p>
          </table:table-cell>
          <table:table-cell office:value-type="float" office:value="60.139378000000001" table:style-name="ce1">
            <text:p>60.139378</text:p>
          </table:table-cell>
          <table:table-cell office:value-type="float" office:value="57.110560999999997" table:style-name="ce1">
            <text:p>57.11056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ar_detection_3d AP</text:p>
          </table:table-cell>
          <table:table-cell office:value-type="float" office:value="27.949508999999999" table:style-name="ce1">
            <text:p>27.949509</text:p>
          </table:table-cell>
          <table:table-cell office:value-type="float" office:value="24.58765" table:style-name="ce1">
            <text:p>24.58765</text:p>
          </table:table-cell>
          <table:table-cell office:value-type="float" office:value="23.919827000000002" table:style-name="ce1">
            <text:p>23.919827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7">
            <text:p>Batch Size 2 Alpha 1.5 Beta 1 Learning Rate 0.001</text:p>
          </table:table-cell>
          <table:covered-table-cell table:number-columns-repeated="3"/>
          <table:table-cell table:style-name="ce6"/>
          <table:table-cell table:number-columns-repeated="4" table:style-name="ce1"/>
          <table:table-cell table:number-columns-repeated="16375" table:style-name="ce6"/>
        </table:table-row>
        <table:table-row table:style-name="ro2">
          <table:table-cell office:value-type="string" table:style-name="ce1">
            <text:p>car_detection AP</text:p>
          </table:table-cell>
          <table:table-cell office:value-type="float" office:value="58.139949999999999" table:style-name="ce1">
            <text:p>58.13995</text:p>
          </table:table-cell>
          <table:table-cell office:value-type="float" office:value="55.034438999999999" table:style-name="ce1">
            <text:p>55.034439</text:p>
          </table:table-cell>
          <table:table-cell office:value-type="float" office:value="52.658123000000003" table:style-name="ce1">
            <text:p>52.65812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ar_orientation AP</text:p>
          </table:table-cell>
          <table:table-cell office:value-type="float" office:value="26.278300999999999" table:style-name="ce1">
            <text:p>26.278301</text:p>
          </table:table-cell>
          <table:table-cell office:value-type="float" office:value="24.518843" table:style-name="ce1">
            <text:p>24.518843</text:p>
          </table:table-cell>
          <table:table-cell office:value-type="float" office:value="24.071135000000002" table:style-name="ce1">
            <text:p>24.071135</text:p>
          </table:table-cell>
          <table:table-cell table:style-name="ce1"/>
          <table:table-cell table:number-columns-repeated="4" table:style-name="ce6"/>
          <table:table-cell table:number-columns-repeated="16375"/>
        </table:table-row>
        <table:table-row table:style-name="ro2">
          <table:table-cell office:value-type="string" table:style-name="ce1">
            <text:p>car_detection_ground</text:p>
          </table:table-cell>
          <table:table-cell office:value-type="float" office:value="71.448043999999996" table:style-name="ce1">
            <text:p>71.448044</text:p>
          </table:table-cell>
          <table:table-cell office:value-type="float" office:value="62.753642999999997" table:style-name="ce1">
            <text:p>62.753643</text:p>
          </table:table-cell>
          <table:table-cell office:value-type="float" office:value="59.436680000000003" table:style-name="ce1">
            <text:p>59.4366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ar_detection_3d AP</text:p>
          </table:table-cell>
          <table:table-cell office:value-type="float" office:value="29.088995000000001" table:style-name="ce1">
            <text:p>29.088995</text:p>
          </table:table-cell>
          <table:table-cell office:value-type="float" office:value="25.889782" table:style-name="ce1">
            <text:p>25.889782</text:p>
          </table:table-cell>
          <table:table-cell office:value-type="float" office:value="25.196235999999999" table:style-name="ce1">
            <text:p>25.196236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7">
            <text:p>Pedestrian default<text:s/></text:p>
          </table:table-cell>
          <table:covered-table-cell table:number-columns-repeated="3"/>
          <table:table-cell table:style-name="ce6"/>
          <table:table-cell table:number-columns-repeated="4" table:style-name="ce1"/>
          <table:table-cell table:number-columns-repeated="16375" table:style-name="ce6"/>
        </table:table-row>
        <table:table-row table:style-name="ro2">
          <table:table-cell office:value-type="string" table:style-name="ce1">
            <text:p>pedestrian_detection AP</text:p>
          </table:table-cell>
          <table:table-cell office:value-type="float" office:value="66.309807000000006" table:style-name="ce1">
            <text:p>66.309807</text:p>
          </table:table-cell>
          <table:table-cell office:value-type="float" office:value="60.556213" table:style-name="ce1">
            <text:p>60.556213</text:p>
          </table:table-cell>
          <table:table-cell office:value-type="float" office:value="53.479140999999998" table:style-name="ce1">
            <text:p>53.47914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edestrian_orientation AP</text:p>
          </table:table-cell>
          <table:table-cell office:value-type="float" office:value="29.509063999999999" table:style-name="ce1">
            <text:p>29.509064</text:p>
          </table:table-cell>
          <table:table-cell office:value-type="float" office:value="27.160072" table:style-name="ce1">
            <text:p>27.160072</text:p>
          </table:table-cell>
          <table:table-cell office:value-type="float" office:value="23.816600999999999" table:style-name="ce1">
            <text:p>23.816601</text:p>
          </table:table-cell>
          <table:table-cell table:style-name="ce1"/>
          <table:table-cell table:number-columns-repeated="4" table:style-name="ce6"/>
          <table:table-cell table:number-columns-repeated="16375"/>
        </table:table-row>
        <table:table-row table:style-name="ro2">
          <table:table-cell office:value-type="string" table:style-name="ce1">
            <text:p>pedestrian_detection_ground</text:p>
          </table:table-cell>
          <table:table-cell office:value-type="float" office:value="50.308723000000001" table:style-name="ce1">
            <text:p>50.308723</text:p>
          </table:table-cell>
          <table:table-cell office:value-type="float" office:value="46.726196000000002" table:style-name="ce1">
            <text:p>46.726196</text:p>
          </table:table-cell>
          <table:table-cell office:value-type="float" office:value="41.245510000000003" table:style-name="ce1">
            <text:p>41.2455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edestrian_detection_3d AP</text:p>
          </table:table-cell>
          <table:table-cell office:value-type="float" office:value="34.161884000000001" table:style-name="ce1">
            <text:p>34.161884</text:p>
          </table:table-cell>
          <table:table-cell office:value-type="float" office:value="30.576440999999999" table:style-name="ce1">
            <text:p>30.576441</text:p>
          </table:table-cell>
          <table:table-cell office:value-type="float" office:value="28.982102999999999" table:style-name="ce1">
            <text:p>28.982103</text:p>
          </table:table-cell>
          <table:table-cell table:style-name="ce1">
            <draw:frame draw:z-index="1" draw:id="id0" draw:style-name="a0" draw:name="Chart 3" svg:x="1.02083in" svg:y="0.1666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7">
            <text:p>pedestrian default batch _size 5</text:p>
          </table:table-cell>
          <table:covered-table-cell table:number-columns-repeated="3"/>
          <table:table-cell table:style-name="ce6"/>
          <table:table-cell table:number-columns-repeated="4" table:style-name="ce1"/>
          <table:table-cell table:number-columns-repeated="16375" table:style-name="ce6"/>
        </table:table-row>
        <table:table-row table:style-name="ro2">
          <table:table-cell office:value-type="string" table:style-name="ce1">
            <text:p>pedestrian_detection AP</text:p>
          </table:table-cell>
          <table:table-cell office:value-type="float" office:value="58.860610999999999" table:style-name="ce1">
            <text:p>58.860611</text:p>
          </table:table-cell>
          <table:table-cell office:value-type="float" office:value="57.009262" table:style-name="ce1">
            <text:p>57.009262</text:p>
          </table:table-cell>
          <table:table-cell office:value-type="float" office:value="51.562224999999998" table:style-name="ce1">
            <text:p>51.56222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edestrian_orientation AP</text:p>
          </table:table-cell>
          <table:table-cell office:value-type="float" office:value="26.436937" table:style-name="ce1">
            <text:p>26.436937</text:p>
          </table:table-cell>
          <table:table-cell office:value-type="float" office:value="25.596015999999999" table:style-name="ce1">
            <text:p>25.596016</text:p>
          </table:table-cell>
          <table:table-cell office:value-type="float" office:value="23.043861" table:style-name="ce1">
            <text:p>23.043861</text:p>
          </table:table-cell>
          <table:table-cell table:style-name="ce1"/>
          <table:table-cell table:number-columns-repeated="4" table:style-name="ce6"/>
          <table:table-cell table:number-columns-repeated="16375"/>
        </table:table-row>
        <table:table-row table:style-name="ro2">
          <table:table-cell office:value-type="string" table:style-name="ce1">
            <text:p>pedestrian_detection_ground</text:p>
          </table:table-cell>
          <table:table-cell office:value-type="float" office:value="45.534058000000002" table:style-name="ce1">
            <text:p>45.534058</text:p>
          </table:table-cell>
          <table:table-cell office:value-type="float" office:value="44.515095000000002" table:style-name="ce1">
            <text:p>44.515095</text:p>
          </table:table-cell>
          <table:table-cell office:value-type="float" office:value="40.178874999999998" table:style-name="ce1">
            <text:p>40.1788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edestrian_detection_3d AP</text:p>
          </table:table-cell>
          <table:table-cell office:value-type="float" office:value="27.838013" table:style-name="ce1">
            <text:p>27.838013</text:p>
          </table:table-cell>
          <table:table-cell office:value-type="float" office:value="27.808206999999999" table:style-name="ce1">
            <text:p>27.808207</text:p>
          </table:table-cell>
          <table:table-cell office:value-type="float" office:value="26.696507" table:style-name="ce1">
            <text:p>26.696507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Default Cyclist</text:p>
          </table:table-cell>
          <table:table-cell table:number-columns-repeated="4" table:style-name="ce6"/>
          <table:table-cell table:number-columns-repeated="4" table:style-name="ce1"/>
          <table:table-cell table:number-columns-repeated="16375" table:style-name="ce6"/>
        </table:table-row>
        <table:table-row table:style-name="ro2">
          <table:table-cell office:value-type="string" table:style-name="ce1">
            <text:p>cyclist_detection AP</text:p>
          </table:table-cell>
          <table:table-cell office:value-type="float" office:value="0.36363600000000001" table:style-name="ce1">
            <text:p>0.363636</text:p>
          </table:table-cell>
          <table:table-cell office:value-type="float" office:value="0.44345899999999999" table:style-name="ce1">
            <text:p>0.443459</text:p>
          </table:table-cell>
          <table:table-cell office:value-type="float" office:value="0.516486" table:style-name="ce1">
            <text:p>0.51648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yclist_orientation AP</text:p>
          </table:table-cell>
          <table:table-cell office:value-type="float" office:value="0.14546500000000001" table:style-name="ce1">
            <text:p>0.145465</text:p>
          </table:table-cell>
          <table:table-cell office:value-type="float" office:value="0.19247" table:style-name="ce1">
            <text:p>0.19247</text:p>
          </table:table-cell>
          <table:table-cell office:value-type="float" office:value="0.21729799999999999" table:style-name="ce1">
            <text:p>0.217298</text:p>
          </table:table-cell>
          <table:table-cell table:style-name="ce1"/>
          <table:table-cell table:number-columns-repeated="4" table:style-name="ce6"/>
          <table:table-cell table:number-columns-repeated="16375"/>
        </table:table-row>
        <table:table-row table:style-name="ro2">
          <table:table-cell office:value-type="string" table:style-name="ce1">
            <text:p>cyclist_detection_ground</text:p>
          </table:table-cell>
          <table:table-cell office:value-type="float" office:value="0.170068" table:style-name="ce1">
            <text:p>0.170068</text:p>
          </table:table-cell>
          <table:table-cell office:value-type="float" office:value="8.7133000000000002E-2" table:style-name="ce1">
            <text:p>0.087133</text:p>
          </table:table-cell>
          <table:table-cell office:value-type="float" office:value="8.7133000000000002E-2" table:style-name="ce1">
            <text:p>0.08713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yclist_detection_3d AP</text:p>
          </table:table-cell>
          <table:table-cell office:value-type="float" office:value="6.5680000000000002E-2" table:style-name="ce1">
            <text:p>0.06568</text:p>
          </table:table-cell>
          <table:table-cell office:value-type="float" office:value="6.8925E-2" table:style-name="ce1">
            <text:p>0.068925</text:p>
          </table:table-cell>
          <table:table-cell office:value-type="float" office:value="6.8925E-2" table:style-name="ce1">
            <text:p>0.068925</text:p>
          </table:table-cell>
          <table:table-cell table:number-columns-repeated="16380" table:style-name="ce1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meta:initial-creator>Jones Agwata</meta:initial-creator>
    <dc:creator>Jones Agwata</dc:creator>
    <meta:creation-date>2018-06-26T08:33:18Z</meta:creation-date>
    <dc:date>2018-07-29T18:09:44Z</dc:date>
    <meta:editing-cycles>3</meta:editing-cycles>
    <meta:editing-duration>PT1086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9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9" chart:class="chart:bar" chart:attached-axis="primary-y" chart:style-name="G0S0">
            <chart:data-point chart:repeated="8"/>
          </chart:series>
          <chart:series chart:label-cell-address="local-table.$C$1" chart:values-cell-range-address="local-table.$C$2:.$C$9" chart:class="chart:bar" chart:attached-axis="primary-y" chart:style-name="G0S1">
            <chart:data-point chart:repeated="8"/>
          </chart:series>
          <chart:series chart:label-cell-address="local-table.$D$1" chart:values-cell-range-address="local-table.$D$2:.$D$9" chart:class="chart:bar" chart:attached-axis="primary-y" chart:style-name="G0S2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Easy</text:p>
              </table:table-cell>
              <table:table-cell office:value-type="string">
                <text:p>Medium</text:p>
              </table:table-cell>
              <table:table-cell office:value-type="string">
                <text:p>Hard</text:p>
              </table:table-cell>
            </table:table-row>
          </table:table-header-rows>
          <table:table-row>
            <table:table-cell office:value-type="string">
              <text:p>car_detection AP</text:p>
            </table:table-cell>
            <table:table-cell office:value-type="float" office:value="71.210792999999995"/>
            <table:table-cell office:value-type="float" office:value="66.723724000000004"/>
            <table:table-cell office:value-type="float" office:value="59.916339999999998"/>
          </table:table-row>
          <table:table-row>
            <table:table-cell office:value-type="string">
              <text:p>car_orientation AP</text:p>
            </table:table-cell>
            <table:table-cell office:value-type="float" office:value="29.040751"/>
            <table:table-cell office:value-type="float" office:value="27.085087000000001"/>
            <table:table-cell office:value-type="float" office:value="24.349730999999998"/>
          </table:table-row>
          <table:table-row>
            <table:table-cell office:value-type="string">
              <text:p>car_detection_ground</text:p>
            </table:table-cell>
            <table:table-cell office:value-type="float" office:value="83.221396999999996"/>
            <table:table-cell office:value-type="float" office:value="71.564475999999999"/>
            <table:table-cell office:value-type="float" office:value="65.815987000000007"/>
          </table:table-row>
          <table:table-row>
            <table:table-cell office:value-type="string">
              <text:p>car_detection_3d AP</text:p>
            </table:table-cell>
            <table:table-cell office:value-type="float" office:value="44.193409000000003"/>
            <table:table-cell office:value-type="float" office:value="37.166308999999998"/>
            <table:table-cell office:value-type="float" office:value="34.312012000000003"/>
          </table:table-row>
          <table:table-row>
            <table:table-cell office:value-type="string">
              <text:p>car_detection AP</text:p>
            </table:table-cell>
            <table:table-cell office:value-type="float" office:value="77.526375000000002"/>
            <table:table-cell office:value-type="float" office:value="67.917511000000005"/>
            <table:table-cell office:value-type="float" office:value="61.966206"/>
          </table:table-row>
          <table:table-row>
            <table:table-cell office:value-type="string">
              <text:p>car_orientation AP</text:p>
            </table:table-cell>
            <table:table-cell office:value-type="float" office:value="34.075690999999999"/>
            <table:table-cell office:value-type="float" office:value="28.937159999999999"/>
            <table:table-cell office:value-type="float" office:value="26.408826999999999"/>
          </table:table-row>
          <table:table-row>
            <table:table-cell office:value-type="string">
              <text:p>car_detection_ground</text:p>
            </table:table-cell>
            <table:table-cell office:value-type="float" office:value="88.252028999999993"/>
            <table:table-cell office:value-type="float" office:value="74.980964999999998"/>
            <table:table-cell office:value-type="float" office:value="69.124595999999997"/>
          </table:table-row>
          <table:table-row>
            <table:table-cell office:value-type="string">
              <text:p>car_detection_3d AP</text:p>
            </table:table-cell>
            <table:table-cell office:value-type="float" office:value="67.599365000000006"/>
            <table:table-cell office:value-type="float" office:value="49.464626000000003"/>
            <table:table-cell office:value-type="float" office:value="44.75388300000000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Average Precision Difference between non urban and urban detections</text:p>
        </chart:title>
        <chart:legend chart:legend-position="end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heet1.$J$2:.$J$5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heet1.$K$1" chart:values-cell-range-address="Sheet1.$K$2:.$K$5" chart:class="chart:bar" chart:attached-axis="primary-y" chart:style-name="G0S0">
            <chart:data-point chart:repeated="4"/>
          </chart:series>
          <chart:series chart:label-cell-address="Sheet1.$L$1" chart:values-cell-range-address="Sheet1.$L$2:.$L$5" chart:class="chart:bar" chart:attached-axis="primary-y" chart:style-name="G0S1">
            <chart:data-point chart:repeated="4"/>
          </chart:series>
          <chart:series chart:label-cell-address="Sheet1.$M$1" chart:values-cell-range-address="Sheet1.$M$2:.$M$5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